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24D1229C8F3B48033C3.png" manifest:media-type="image/png"/>
  <manifest:file-entry manifest:full-path="Pictures/100000000000080000000464F770ACDE426181E0.png" manifest:media-type="image/png"/>
  <manifest:file-entry manifest:full-path="Pictures/10000000000008000000046447C546080B92A704.png" manifest:media-type="image/png"/>
  <manifest:file-entry manifest:full-path="Pictures/1000020100000800000002D10A24C8950A56CE7A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65cm, 0cm, 0.386cm, 1.578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523cm" style:use-optimal-column-width="false"/>
    </style:style>
    <style:style style:name="co2" style:family="table-column">
      <style:table-column-properties style:column-width="3.524cm" style:use-optimal-column-width="false"/>
    </style:style>
    <style:style style:name="ro1" style:family="table-row">
      <style:table-row-properties style:row-height="2.279cm"/>
    </style:style>
    <style:style style:name="ro2" style:family="table-row">
      <style:table-row-properties style:row-height="1.6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595959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standard" draw:layer="layout" svg:width="21.138cm" svg:height="8.878cm" svg:x="2.646cm" svg:y="1.0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(Metadata columns)</text:span></text:p>
              </table:table-cell>
              <table:table-cell>
                <text:p text:style-name="P1"><text:span text:style-name="T1">Industrial Animal Farm</text:span></text:p>
              </table:table-cell>
              <table:table-cell>
                <text:p text:style-name="P1"><text:span text:style-name="T1">Industrial Poultry Farm</text:span></text:p>
              </table:table-cell>
              <table:table-cell>
                <text:p text:style-name="P1"><text:span text:style-name="T1">Industrial Pig Farm</text:span></text:p>
              </table:table-cell>
              <table:table-cell>
                <text:p text:style-name="P1"><text:span text:style-name="T1">Industrial Cattle Far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luster 1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Cluster 2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Cluster 3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  <table:table-cell>
                <text:p text:style-name="P1"><text:span text:style-name="T2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luster 4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𐄂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Google Shape;55;p13" draw:style-name="gr1" draw:text-style-name="P2" draw:layer="layout" svg:width="7.035cm" svg:height="1.603cm" svg:x="9.698cm" svg:y="10.888cm">
          <text:p text:style-name="P1"><text:span text:style-name="T3">Final category</text:span><text:span text:style-name="T4"> based on model(s) and/or lab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6.722cm" svg:height="0.001cm" svg:x="9.703cm" svg:y="10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1" draw:text-style-name="P2" draw:layer="layout" svg:width="6.783cm" svg:height="1.603cm" svg:x="17.613cm" svg:y="11.258cm">
          <text:p text:style-name="P1"><text:span text:style-name="T4">If we have a lab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3" draw:layer="layout" svg:width="6.555cm" svg:height="0.001cm" svg:x="17.23cm" svg:y="10.8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3;p14" draw:style-name="standard" draw:layer="layout" svg:width="21.138cm" svg:height="8.878cm" svg:x="2.646cm" svg:y="1.0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(Metadata columns)</text:span></text:p>
              </table:table-cell>
              <table:table-cell>
                <text:p text:style-name="P1"><text:span text:style-name="T1">Industrial Animal Farm</text:span></text:p>
              </table:table-cell>
              <table:table-cell>
                <text:p text:style-name="P1"><text:span text:style-name="T1">Industrial Poultry Farm</text:span></text:p>
              </table:table-cell>
              <table:table-cell>
                <text:p text:style-name="P1"><text:span text:style-name="T1">Industrial Pig Farm</text:span></text:p>
              </table:table-cell>
              <table:table-cell>
                <text:p text:style-name="P1"><text:span text:style-name="T1">Industrial Cattle Far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luster 1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Cluster 2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Cluster 3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✓</text:span></text:p>
              </table:table-cell>
              <table:table-cell/>
              <table:table-cell/>
              <table:table-cell>
                <text:p text:style-name="P1"><text:span text:style-name="T2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luster 4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𐄂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64;p14" draw:style-name="gr4" draw:text-style-name="P2" draw:layer="layout" svg:width="6.997cm" svg:height="9.932cm" svg:x="9.741cm" svg:y="0.84cm">
          <text:p text:style-name="P5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5" draw:text-style-name="P2" draw:layer="layout" svg:width="6.997cm" svg:height="0.802cm" svg:x="9.856cm" svg:y="11.117cm">
          <text:p text:style-name="P5"><text:span text:style-name="T3">3-class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2" draw:layer="layout" svg:width="4.047cm" svg:height="0.698cm" svg:x="9.168cm" svg:y="12.519cm">
          <text:p text:style-name="P5"><text:span text:style-name="T3">Poultry + Other Fa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5" draw:text-style-name="P2" draw:layer="layout" svg:width="4.047cm" svg:height="0.698cm" svg:x="13.216cm" svg:y="12.519cm">
          <text:p text:style-name="P5"><text:span text:style-name="T3">Poul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3ef28484ef9_0_5:notes" draw:style-name="gr3" draw:layer="layout" svg:width="16.932cm" svg:height="9.524cm" svg:x="1.059cm" svg:y="1.905cm" draw:page-number="2" presentation:class="page"/>
          <draw:frame draw:name="Google Shape;61;g3ef28484ef9_0_5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2;p15" draw:style-name="gr1" draw:text-style-name="P2" draw:layer="layout" svg:width="22.194cm" svg:height="11.765cm" svg:x="1.834cm" svg:y="0.993cm">
          <text:list text:style-name="L3">
            <text:list-item>
              <text:p text:style-name="P6"><text:span text:style-name="T5">“</text:span><text:span text:style-name="T5">Training countries”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6">BRA, CHL, MEX, THA, USA</text:span></text:p>
                </text:list-item>
                <text:list-item>
                  <text:p text:style-name="P6"><text:span text:style-name="T6">CNN train/val/test; eval set</text:span></text:p>
                </text:list-item>
                <text:list-item>
                  <text:p text:style-name="P6"><text:span text:style-name="T6">IF is fitted to USA-DMV subset only; everything else is available for evaluation</text:span></text:p>
                </text:list-item>
              </text:list>
            </text:list-item>
            <text:list-item>
              <text:p text:style-name="P6"><text:span text:style-name="T5">“</text:span><text:span text:style-name="T5">Generalization countries”</text:span></text:p>
              <text:list>
                <text:list-item>
                  <text:p text:style-name="P6"><text:span text:style-name="T6">BGD, NGA (could add more)</text:span></text:p>
                </text:list-item>
                <text:list-item>
                  <text:p text:style-name="P6"><text:span text:style-name="T6">CNN generalization, out-of-distribution</text:span></text:p>
                </text:list-item>
                <text:list-item>
                  <text:p text:style-name="P6"><text:span text:style-name="T6">IF evaluation</text:span></text:p>
                </text:list-item>
              </text:list>
            </text:list-item>
            <text:list-item>
              <text:p text:style-name="P6"><text:span text:style-name="T5">“</text:span><text:span text:style-name="T5">Labeled countries”</text:span></text:p>
              <text:list>
                <text:list-item>
                  <text:p text:style-name="P6"><text:span text:style-name="T6">All of the above</text:span></text:p>
                </text:list-item>
                <text:list-item>
                  <text:p text:style-name="P6"><text:span text:style-name="T6">This is what we use for model training/fitting and evalu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ef28484ef9_0_17:notes" draw:style-name="gr3" draw:layer="layout" svg:width="16.932cm" svg:height="9.524cm" svg:x="1.059cm" svg:y="1.905cm" draw:page-number="3" presentation:class="page"/>
          <draw:frame draw:name="Google Shape;70;g3ef28484ef9_0_1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7;p16" draw:style-name="gr1" draw:text-style-name="P2" draw:layer="layout" svg:width="22.194cm" svg:height="11.765cm" svg:x="1.834cm" svg:y="0.993cm">
          <text:list text:style-name="L3">
            <text:list-item>
              <text:p text:style-name="P6"><text:span text:style-name="T5">“</text:span><text:span text:style-name="T5">Inference countries”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6">Any other country</text:span></text:p>
                </text:list-item>
                <text:list-item>
                  <text:p text:style-name="P6"><text:span text:style-name="T6">Some have labels available (not yet integrated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6">Argentina, Australia: many FT labels</text:span></text:p>
                    </text:list-item>
                    <text:list-item>
                      <text:p text:style-name="P6"><text:span text:style-name="T6">Canada, India, Colombia, …: some FT labels</text:span></text:p>
                    </text:list-item>
                    <text:list-item>
                      <text:p text:style-name="P6"><text:span text:style-name="T6">EU: official dataset</text:span></text:p>
                    </text:list-item>
                    <text:list-item>
                      <text:p text:style-name="P6"><text:span text:style-name="T6">UK: official dataset</text:span></text:p>
                    </text:list-item>
                    <text:list-item>
                      <text:p text:style-name="P6"><text:span text:style-name="T6">Various clusters I’ve inspected</text:span></text:p>
                    </text:list-item>
                  </text:list>
                </text:list-item>
                <text:list-item>
                  <text:p text:style-name="P6"><text:span text:style-name="T6">Use for </text:span><text:span text:style-name="T7">understanding models</text:span><text:span text:style-name="T6"> and assigning </text:span><text:span text:style-name="T7">final categories</text:span></text:p>
                </text:list-item>
                <text:list-item>
                  <text:p text:style-name="P6"><text:span text:style-name="T6">Why not for model training and formal evaluation?</text:span></text:p>
                  <text:list>
                    <text:list-item>
                      <text:p text:style-name="P6"><text:span text:style-name="T6">CNN training: data balancing, we care about countries that are “not like” Australia, EU, UK</text:span></text:p>
                    </text:list-item>
                    <text:list-item>
                      <text:p text:style-name="P6"><text:span text:style-name="T6">Model eval: not statistically valid samples</text:span></text:p>
                    </text:list-item>
                    <text:list-item>
                      <text:p text:style-name="P6"><text:span text:style-name="T6">Model eval: too many numbers to analyse and report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3ef28484ef9_0_23:notes" draw:style-name="gr3" draw:layer="layout" svg:width="16.932cm" svg:height="9.524cm" svg:x="1.059cm" svg:y="1.905cm" draw:page-number="4" presentation:class="page"/>
          <draw:frame draw:name="Google Shape;75;g3ef28484ef9_0_2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2;p17" draw:style-name="gr1" draw:text-style-name="P2" draw:layer="layout" svg:width="22.194cm" svg:height="12.632cm" svg:x="1.795cm" svg:y="1.261cm">
          <text:list text:style-name="L3">
            <text:list-item>
              <text:p text:style-name="P6"><text:span text:style-name="T5">Eval 1: </text:span><text:span text:style-name="T8">training country</text:span><text:span text:style-name="T5"> data not used for fitting/training/validation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6">CNN: the usual held-out test set</text:span></text:p>
                </text:list-item>
                <text:list-item>
                  <text:p text:style-name="P6"><text:span text:style-name="T6">IF: Everything except DMV</text:span></text:p>
                </text:list-item>
              </text:list>
            </text:list-item>
            <text:list-item>
              <text:p text:style-name="P6"><text:span text:style-name="T5">Eval 2: </text:span><text:span text:style-name="T8">training country</text:span><text:span text:style-name="T5"> representative samples</text:span></text:p>
              <text:list>
                <text:list-item>
                  <text:p text:style-name="P6"><text:span text:style-name="T6">Labels are biased</text:span></text:p>
                </text:list-item>
                <text:list-item>
                  <text:p text:style-name="P6"><text:span text:style-name="T6">So, create representative sample using random samples of unlabeled data</text:span></text:p>
                </text:list-item>
                <text:list-item>
                  <text:p text:style-name="P6"><text:span text:style-name="T6">→ “</text:span><text:span text:style-name="T6">eval set”, 100-150 per country</text:span></text:p>
                </text:list-item>
                <text:list-item>
                  <text:p text:style-name="P6"><text:span text:style-name="T6">Exclude these from (1)</text:span></text:p>
                </text:list-item>
              </text:list>
            </text:list-item>
            <text:list-item>
              <text:p text:style-name="P6"><text:span text:style-name="T5">Eval 3:generalization</text:span><text:span text:style-name="T8"> country</text:span><text:span text:style-name="T5"> data</text:span></text:p>
              <text:list>
                <text:list-item>
                  <text:p text:style-name="P6"><text:span text:style-name="T6">All BGD clusters, 100 random ones from Nigeria</text:span></text:p>
                </text:list-item>
                <text:list-item>
                  <text:p text:style-name="P6"><text:span text:style-name="T6">Tests CNN generaliz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ef28484ef9_0_27:notes" draw:style-name="gr3" draw:layer="layout" svg:width="16.932cm" svg:height="9.524cm" svg:x="1.059cm" svg:y="1.905cm" draw:page-number="5" presentation:class="page"/>
          <draw:frame draw:name="Google Shape;80;g3ef28484ef9_0_2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87;p18" draw:style-name="gr1" draw:text-style-name="P2" draw:layer="layout" svg:width="22.992cm" svg:height="12.632cm" svg:x="1.795cm" svg:y="1.261cm">
          <text:list text:style-name="L3">
            <text:list-item>
              <text:p text:style-name="P6"><text:span text:style-name="T5">Other/Informal evals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5">Confidently-wrong predictions in the training + test countri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5">Incorrect labels</text:span></text:p>
                    </text:list-item>
                    <text:list-item>
                      <text:p text:style-name="P6"><text:span text:style-name="T5">Surprising bad predictions</text:span></text:p>
                    </text:list-item>
                    <text:list-item>
                      <text:p text:style-name="P6"><text:span text:style-name="T5">Genuinely difficult cases</text:span></text:p>
                    </text:list-item>
                  </text:list>
                </text:list-item>
                <text:list-item>
                  <text:p text:style-name="P6"><text:span text:style-name="T5">Look at stuff in the inference countries</text:span></text:p>
                </text:list-item>
              </text:list>
            </text:list-item>
          </text:list>
          <text:p text:style-name="P1"><text:span text:style-name="T5"/></text:p>
          <text:p text:style-name="P1"><text:span text:style-name="T5">Next slides: 3-Class v3, “Farm” = “Poultry+Other” vs NotFa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3ef28484ef9_0_33:notes" draw:style-name="gr3" draw:layer="layout" svg:width="16.932cm" svg:height="9.524cm" svg:x="1.059cm" svg:y="1.905cm" draw:page-number="6" presentation:class="page"/>
          <draw:frame draw:name="Google Shape;85;g3ef28484ef9_0_3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2;p19" draw:style-name="gr6" draw:text-style-name="P3" draw:layer="layout" svg:width="24.489cm" svg:height="13.44cm" svg:x="0.423cm" svg:y="0.423cm">
          <draw:image xlink:href="Pictures/10000000000008000000046447C546080B92A704.png" xlink:type="simple" xlink:show="embed" xlink:actuate="onLoad">
            <text:p/>
          </draw:image>
        </draw:frame>
        <draw:custom-shape draw:name="Google Shape;93;p19" draw:style-name="gr5" draw:text-style-name="P2" draw:layer="layout" svg:width="6.069cm" svg:height="2.147cm" svg:x="18.443cm" svg:y="10.786cm">
          <text:p text:style-name="P5"><text:span text:style-name="T9">EVA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3ef28484ef9_0_37:notes" draw:style-name="gr3" draw:layer="layout" svg:width="16.932cm" svg:height="9.524cm" svg:x="1.059cm" svg:y="1.905cm" draw:page-number="7" presentation:class="page"/>
          <draw:frame draw:name="Google Shape;90;g3ef28484ef9_0_3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98;p20" draw:style-name="gr6" draw:text-style-name="P3" draw:layer="layout" svg:width="25.399cm" svg:height="13.939cm" svg:x="0cm" svg:y="0.641cm">
          <draw:image xlink:href="Pictures/100000000000080000000464F770ACDE426181E0.png" xlink:type="simple" xlink:show="embed" xlink:actuate="onLoad">
            <text:p/>
          </draw:image>
        </draw:frame>
        <draw:custom-shape draw:name="Google Shape;99;p20" draw:style-name="gr5" draw:text-style-name="P2" draw:layer="layout" svg:width="6.069cm" svg:height="2.147cm" svg:x="18.443cm" svg:y="11.159cm">
          <text:p text:style-name="P5"><text:span text:style-name="T9">EVA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1" draw:text-style-name="P2" draw:layer="layout" svg:width="7.522cm" svg:height="0.689cm" svg:x="17.716cm" svg:y="12.804cm">
          <text:p text:style-name="P1"><text:span text:style-name="T4">Number of rows in eval sets looks wro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3ef28484ef9_0_43:notes" draw:style-name="gr3" draw:layer="layout" svg:width="16.932cm" svg:height="9.524cm" svg:x="1.059cm" svg:y="1.905cm" draw:page-number="8" presentation:class="page"/>
          <draw:frame draw:name="Google Shape;96;g3ef28484ef9_0_4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05;p21" draw:style-name="gr6" draw:text-style-name="P3" draw:layer="layout" svg:width="24.552cm" svg:height="7.048cm" svg:x="0.423cm" svg:y="0.423cm">
          <draw:image xlink:href="Pictures/10000000000008000000024D1229C8F3B48033C3.png" xlink:type="simple" xlink:show="embed" xlink:actuate="onLoad">
            <text:p/>
          </draw:image>
        </draw:frame>
        <draw:custom-shape draw:name="Google Shape;106;p21" draw:style-name="gr5" draw:text-style-name="P2" draw:layer="layout" svg:width="6.069cm" svg:height="2.147cm" svg:x="18.443cm" svg:y="11.159cm">
          <text:p text:style-name="P5"><text:span text:style-name="T9">EVAL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21" draw:style-name="gr1" draw:text-style-name="P2" draw:layer="layout" svg:width="15.221cm" svg:height="3.267cm" svg:x="2.568cm" svg:y="8.778cm">
          <text:p text:style-name="P1"><text:span text:style-name="T4">Needs CNN predictions on</text:span></text:p>
          <text:p text:style-name="P1"><text:span text:style-name="T4">BGD_selected_clusters_for_analysis</text:span></text:p>
          <text:p text:style-name="P1"><text:span text:style-name="T4">NGA_selected_clusters_for_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3ef28484ef9_0_50:notes" draw:style-name="gr3" draw:layer="layout" svg:width="16.932cm" svg:height="9.524cm" svg:x="1.059cm" svg:y="1.905cm" draw:page-number="9" presentation:class="page"/>
          <draw:frame draw:name="Google Shape;103;g3ef28484ef9_0_5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12;p22" draw:style-name="gr7" draw:text-style-name="P3" draw:layer="layout" svg:width="24.596cm" svg:height="8.296cm" svg:x="0.401cm" svg:y="2.692cm">
          <draw:image xlink:href="Pictures/1000020100000800000002D10A24C8950A56CE7A.png" xlink:type="simple" xlink:show="embed" xlink:actuate="onLoad">
            <text:p/>
          </draw:image>
        </draw:frame>
        <draw:custom-shape draw:name="Google Shape;113;p22" draw:style-name="gr4" draw:text-style-name="P2" draw:layer="layout" svg:width="2.035cm" svg:height="2.173cm" svg:x="22.963cm" svg:y="8.662cm">
          <text:p text:style-name="P5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22" draw:style-name="gr8" draw:text-style-name="P2" draw:layer="layout" svg:width="7.556cm" svg:height="2.033cm" svg:x="16.864cm" svg:y="11.734cm">
          <text:p text:style-name="P1"><text:span text:style-name="T3">Bad labels?? (Propagate original cols if possi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2" draw:style-name="gr9" draw:text-style-name="P3" draw:layer="layout" svg:width="1.992cm" svg:height="0.897cm" draw:transform="rotate (-3.14159265358979) translate (23.532cm 11.8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22" draw:style-name="gr1" draw:text-style-name="P2" draw:layer="layout" svg:width="15.771cm" svg:height="0.897cm" svg:x="0.725cm" svg:y="0.759cm">
          <text:p text:style-name="P1"><text:span text:style-name="T4">3-class model v3, (Poultry+Other) vs (NotFa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ef28484ef9_0_61:notes" draw:style-name="gr3" draw:layer="layout" svg:width="16.932cm" svg:height="9.524cm" svg:x="1.059cm" svg:y="1.905cm" draw:page-number="10" presentation:class="page"/>
          <draw:frame draw:name="Google Shape;110;g3ef28484ef9_0_6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21;p23" draw:style-name="gr1" draw:text-style-name="P2" draw:layer="layout" svg:width="21.36cm" svg:height="9.526cm" svg:x="2.14cm" svg:y="2.692cm">
          <text:list text:style-name="L3">
            <text:list-item>
              <text:p text:style-name="P6"><text:span text:style-name="T5">3-class model v3, (Poultry+Other) vs (NotFarm)</text:span></text:p>
            </text:list-item>
            <text:list-item>
              <text:p text:style-name="P6"><text:span text:style-name="T5">Inference countries - just a quick look!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6">Algeria: solar panels </text:span><text:span text:style-name="T10">not </text:span><text:span text:style-name="T6">misidentified as farms in the 3-class model (v3)</text:span></text:p>
                </text:list-item>
                <text:list-item>
                  <text:p text:style-name="P6"><text:span text:style-name="T6">Albania: plastic crop covers/greenhouses are frequently misidentified as farms</text:span></text:p>
                </text:list-item>
                <text:list-item>
                  <text:p text:style-name="P6"><text:span text:style-name="T6">I have labeled these as NotFarm; how to use?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6"><text:span text:style-name="T7">NB these countries do not yet have their _selected_clusters_for_analysis files ye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3ef28484ef9_0_72:notes" draw:style-name="gr3" draw:layer="layout" svg:width="16.932cm" svg:height="9.524cm" svg:x="1.059cm" svg:y="1.905cm" draw:page-number="11" presentation:class="page"/>
          <draw:frame draw:name="Google Shape;119;g3ef28484ef9_0_7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